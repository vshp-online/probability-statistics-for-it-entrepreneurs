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4.838cm"/>
    </style:style>
    <style:style style:name="co3" style:family="table-column">
      <style:table-column-properties fo:break-before="auto" style:column-width="8.363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2.293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page" style:use-optimal-row-height="true"/>
    </style:style>
    <style:style style:name="ta1" style:family="table" style:master-page-name="PageStyle_5f_Данные">
      <style:table-properties table:display="true" style:writing-mode="lr-tb"/>
    </style:style>
    <style:style style:name="ta2" style:family="table" style:master-page-name="PageStyle_5f_Распределение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f4e5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4a5a6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9eaf0" style:diagonal-bl-tr="none" style:diagonal-tl-br="none" style:text-align-source="fix" style:repeat-content="false" fo:wrap-option="wrap" fo:border="0.74pt solid #8a9ba1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1">
      <style:table-cell-properties style:diagonal-bl-tr="none" style:diagonal-tl-br="none" fo:border="0.74pt solid #b7c1c5"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f4e5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4a5a6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7">
      <style:table-cell-properties fo:background-color="#fff4cc" style:diagonal-bl-tr="none" style:diagonal-tl-br="none" fo:border="0.74pt solid #d2c27b" style:rotation-align="none"/>
    </style:style>
    <style:style style:name="ce8" style:family="table-cell" style:parent-style-name="Default" style:data-style-name="N137">
      <style:table-cell-properties style:diagonal-bl-tr="none" style:diagonal-tl-br="none" fo:border="0.74pt solid #b7c1c5" style:rotation-align="none"/>
    </style:style>
    <style:style style:name="ce9" style:family="table-cell" style:parent-style-name="Default">
      <style:table-cell-properties fo:background-color="#e8f1e2" style:diagonal-bl-tr="none" style:diagonal-tl-br="none" fo:border="0.74pt solid #9eb493" style:rotation-align="none"/>
    </style:style>
    <style:style style:name="ce1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4a5a6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4a5a6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" style:family="table-cell" style:parent-style-name="Default" style:data-style-name="N138">
      <style:table-cell-properties style:diagonal-bl-tr="none" style:diagonal-tl-br="none" fo:border="0.74pt solid #b7c1c5" style:rotation-align="non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left" loext:paragraph-composer="false"/>
      <style:text-properties fo:font-size="18pt"/>
    </style:style>
    <style:style style:name="P1" style:family="paragraph">
      <loext:graphic-properties draw:fill="none"/>
      <style:paragraph-properties fo:text-align="left" loext:paragraph-composer="false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Данные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number-columns-repeated="16381"/>
        <table:table-row table:style-name="ro1">
          <table:table-cell table:style-name="ce1" office:value-type="string" calcext:value-type="string" table:number-columns-spanned="3" table:number-rows-spanned="1">
            <text:p>Время обработки заказов</text:p>
          </table:table-cell>
          <table:covered-table-cell table:number-columns-repeated="2" table:style-name="ce5"/>
          <table:table-cell table:style-name="Default"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Жёлтые ячейки — исходные наблюдения. Значения указаны в секундах.</text:p>
          </table:table-cell>
          <table:covered-table-cell table:number-columns-repeated="2" table:style-name="ce6"/>
          <table:table-cell table:style-name="Default" table:number-columns-repeated="16381"/>
        </table:table-row>
        <table:table-row table:style-name="ro2">
          <table:table-cell table:style-name="ce3" office:value-type="string" calcext:value-type="string">
            <text:p>Наблюдение</text:p>
          </table:table-cell>
          <table:table-cell table:style-name="ce3" office:value-type="string" calcext:value-type="string">
            <text:p>Время, с</text:p>
          </table:table-cell>
          <table:table-cell table:style-name="ce3" office:value-type="string" calcext:value-type="string">
            <text:p>Комментарий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9.7" calcext:value-type="float">
            <text:p>79,7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4.8" calcext:value-type="float">
            <text:p>64,8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9.8" calcext:value-type="float">
            <text:p>79,8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6.5" calcext:value-type="float">
            <text:p>76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1.7" calcext:value-type="float">
            <text:p>61,7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1.7" calcext:value-type="float">
            <text:p>61,7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4.5" calcext:value-type="float">
            <text:p>74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0.5" calcext:value-type="float">
            <text:p>70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9.5" calcext:value-type="float">
            <text:p>59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6.5" calcext:value-type="float">
            <text:p>66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7.6" calcext:value-type="float">
            <text:p>67,6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8.6" calcext:value-type="float">
            <text:p>68,6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1.5" calcext:value-type="float">
            <text:p>71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4.5" calcext:value-type="float">
            <text:p>74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9.7" calcext:value-type="float">
            <text:p>69,7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6.5" calcext:value-type="float">
            <text:p>66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6.5" calcext:value-type="float">
            <text:p>66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7.5" calcext:value-type="float">
            <text:p>57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2.8" calcext:value-type="float">
            <text:p>62,8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73.2" calcext:value-type="float">
            <text:p>73,2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,2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1.3" calcext:value-type="float">
            <text:p>61,3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7.5" calcext:value-type="float">
            <text:p>57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8.5" calcext:value-type="float">
            <text:p>68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4.5" calcext:value-type="float">
            <text:p>74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7.5" calcext:value-type="float">
            <text:p>57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.2" calcext:value-type="float">
            <text:p>62,2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2.5" calcext:value-type="float">
            <text:p>72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8.5" calcext:value-type="float">
            <text:p>68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70.3" calcext:value-type="float">
            <text:p>70,3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1.5" calcext:value-type="float">
            <text:p>61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4.5" calcext:value-type="float">
            <text:p>64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2.5" calcext:value-type="float">
            <text:p>72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6.5" calcext:value-type="float">
            <text:p>56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5.2" calcext:value-type="float">
            <text:p>65,2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6.5" calcext:value-type="float">
            <text:p>56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9.5" calcext:value-type="float">
            <text:p>59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61.3" calcext:value-type="float">
            <text:p>61,3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5.5" calcext:value-type="float">
            <text:p>75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2.4" calcext:value-type="float">
            <text:p>62,4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4.6" calcext:value-type="float">
            <text:p>64,6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2.5" calcext:value-type="float">
            <text:p>62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6.1" calcext:value-type="float">
            <text:p>66,1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4.7" calcext:value-type="float">
            <text:p>64,7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2.9" calcext:value-type="float">
            <text:p>52,9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,0</text:p>
          </table:table-cell>
          <table:table-cell/>
          <table:table-cell table:style-name="Default" table:number-columns-repeated="16381"/>
        </table:table-row>
      </table:table>
      <table:table table:name="Распределение" table:style-name="ta2" table:print-ranges="Распределение.A1:Распределение.N43">
        <table:table-column table:style-name="co5" table:number-columns-repeated="2" table:default-cell-style-name="ce8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8" table:default-cell-style-name="Default"/>
        <table:table-column table:style-name="co4" table:number-columns-repeated="16370"/>
        <table:table-row table:style-name="ro1">
          <table:table-cell table:style-name="ce1" office:value-type="string" calcext:value-type="string" table:number-columns-spanned="14" table:number-rows-spanned="1">
            <text:p>Эмпирическое распределение времени обработки заказов</text:p>
          </table:table-cell>
          <table:covered-table-cell table:number-columns-repeated="13" table:style-name="ce5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 table:number-columns-spanned="14" table:number-rows-spanned="1">
            <text:p>Расчёты выполняются формулами по листу «Данные». Замените наблюдения и при необходимости скорректируйте число интервалов.</text:p>
          </table:table-cell>
          <table:covered-table-cell table:number-columns-repeated="13" table:style-name="ce6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Число наблюдений</text:p>
          </table:table-cell>
          <table:table-cell table:style-name="ce4" table:formula="of:=COUNT([$Данные.$B$4:.$B$123])" office:value-type="float" office:value="120" calcext:value-type="float">
            <text:p>120</text:p>
          </table:table-cell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Минимум, с</text:p>
          </table:table-cell>
          <table:table-cell table:formula="of:=MIN([$Данные.$B$4:.$B$123])" office:value-type="float" office:value="52" calcext:value-type="float">
            <text:p>52,0</text:p>
          </table:table-cell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Максимум, с</text:p>
          </table:table-cell>
          <table:table-cell table:formula="of:=MAX([$Данные.$B$4:.$B$123])" office:value-type="float" office:value="79.8" calcext:value-type="float">
            <text:p>79,8</text:p>
          </table:table-cell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Число интервалов</text:p>
          </table:table-cell>
          <table:table-cell table:style-name="ce4" table:formula="of:=ROUNDUP(1+LOG([.B3];2);0)" office:value-type="float" office:value="8" calcext:value-type="float">
            <text:p>8</text:p>
          </table:table-cell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Ширина интервала, с</text:p>
          </table:table-cell>
          <table:table-cell table:formula="of:=ROUNDUP(([.B5]-[.B4])/[.B6]*2;0)/2" office:value-type="float" office:value="3.5" calcext:value-type="float">
            <text:p>3,5</text:p>
          </table:table-cell>
          <table:table-cell table:number-columns-repeated="12"/>
          <table:table-cell table:style-name="Default" table:number-columns-repeated="16370"/>
        </table:table-row>
        <table:table-row table:style-name="ro2" table:number-rows-repeated="2">
          <table:table-cell table:style-name="Default" table:number-columns-repeated="2"/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Default" table:number-columns-repeated="2"/>
          <table:table-cell table:number-columns-repeated="4"/>
          <table:table-cell>
            <draw:frame table:end-cell-address="Распределение.M25" table:end-x="1.957cm" table:end-y="0.052cm" draw:z-index="0" draw:name="Chart 1" draw:style-name="gr1" draw:text-style-name="P1" svg:width="15.715cm" svg:height="8.302cm" svg:x="0cm" svg:y="0cm">
              <draw:object draw:notify-on-update-of-ranges="Распределение.C12:Распределение.C19 Распределение.E12:Распределение.E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Default" table:number-columns-repeated="16370"/>
        </table:table-row>
        <table:table-row table:style-name="ro3">
          <table:table-cell table:style-name="ce3" office:value-type="string" calcext:value-type="string">
            <text:p>Нижняя граница</text:p>
          </table:table-cell>
          <table:table-cell table:style-name="ce3" office:value-type="string" calcext:value-type="string">
            <text:p>Верхняя граница</text:p>
          </table:table-cell>
          <table:table-cell table:style-name="ce3" office:value-type="string" calcext:value-type="string">
            <text:p>Середина</text:p>
          </table:table-cell>
          <table:table-cell table:style-name="ce3" office:value-type="string" calcext:value-type="string">
            <text:p>Частота</text:p>
          </table:table-cell>
          <table:table-cell table:style-name="ce3" office:value-type="string" calcext:value-type="string">
            <text:p>Частость</text:p>
          </table:table-cell>
          <table:table-cell table:style-name="ce3" office:value-type="string" calcext:value-type="string">
            <text:p>Накопленная частость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$B$4]" office:value-type="float" office:value="52" calcext:value-type="float">
            <text:p>52,0</text:p>
          </table:table-cell>
          <table:table-cell table:formula="of:=[.A12]+[.$B$7]" office:value-type="float" office:value="55.5" calcext:value-type="float">
            <text:p>55,5</text:p>
          </table:table-cell>
          <table:table-cell table:style-name="ce8" table:formula="of:=([.A12]+[.B12])/2" office:value-type="float" office:value="53.75" calcext:value-type="float">
            <text:p>53,8</text:p>
          </table:table-cell>
          <table:table-cell table:style-name="ce4" table:formula="of:=COUNTIFS([$Данные.$B$4:.$B$123];&quot;&gt;=&quot;&amp;[.A12];[$Данные.$B$4:.$B$123];&quot;&lt;&quot;&amp;[.B12])" office:value-type="float" office:value="8" calcext:value-type="float">
            <text:p>8</text:p>
          </table:table-cell>
          <table:table-cell table:style-name="ce12" table:formula="of:=[.D12]/[.$B$3]" office:value-type="percentage" office:value="0.0666666666666667" calcext:value-type="percentage">
            <text:p>6,7%</text:p>
          </table:table-cell>
          <table:table-cell table:style-name="ce12" table:formula="of:=SUM([.$E$12:.E12])" office:value-type="percentage" office:value="0.0666666666666667" calcext:value-type="percentage">
            <text:p>6,7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2]" office:value-type="float" office:value="55.5" calcext:value-type="float">
            <text:p>55,5</text:p>
          </table:table-cell>
          <table:table-cell table:formula="of:=[.A13]+[.$B$7]" office:value-type="float" office:value="59" calcext:value-type="float">
            <text:p>59,0</text:p>
          </table:table-cell>
          <table:table-cell table:style-name="ce8" table:formula="of:=([.A13]+[.B13])/2" office:value-type="float" office:value="57.25" calcext:value-type="float">
            <text:p>57,3</text:p>
          </table:table-cell>
          <table:table-cell table:style-name="ce4" table:formula="of:=COUNTIFS([$Данные.$B$4:.$B$123];&quot;&gt;=&quot;&amp;[.A13];[$Данные.$B$4:.$B$123];&quot;&lt;&quot;&amp;[.B13])" office:value-type="float" office:value="17" calcext:value-type="float">
            <text:p>17</text:p>
          </table:table-cell>
          <table:table-cell table:style-name="ce12" table:formula="of:=[.D13]/[.$B$3]" office:value-type="percentage" office:value="0.141666666666667" calcext:value-type="percentage">
            <text:p>14,2%</text:p>
          </table:table-cell>
          <table:table-cell table:style-name="ce12" table:formula="of:=SUM([.$E$12:.E13])" office:value-type="percentage" office:value="0.208333333333333" calcext:value-type="percentage">
            <text:p>20,8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3]" office:value-type="float" office:value="59" calcext:value-type="float">
            <text:p>59,0</text:p>
          </table:table-cell>
          <table:table-cell table:formula="of:=[.A14]+[.$B$7]" office:value-type="float" office:value="62.5" calcext:value-type="float">
            <text:p>62,5</text:p>
          </table:table-cell>
          <table:table-cell table:style-name="ce8" table:formula="of:=([.A14]+[.B14])/2" office:value-type="float" office:value="60.75" calcext:value-type="float">
            <text:p>60,8</text:p>
          </table:table-cell>
          <table:table-cell table:style-name="ce4" table:formula="of:=COUNTIFS([$Данные.$B$4:.$B$123];&quot;&gt;=&quot;&amp;[.A14];[$Данные.$B$4:.$B$123];&quot;&lt;&quot;&amp;[.B14])" office:value-type="float" office:value="26" calcext:value-type="float">
            <text:p>26</text:p>
          </table:table-cell>
          <table:table-cell table:style-name="ce12" table:formula="of:=[.D14]/[.$B$3]" office:value-type="percentage" office:value="0.216666666666667" calcext:value-type="percentage">
            <text:p>21,7%</text:p>
          </table:table-cell>
          <table:table-cell table:style-name="ce12" table:formula="of:=SUM([.$E$12:.E14])" office:value-type="percentage" office:value="0.425" calcext:value-type="percentage">
            <text:p>42,5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4]" office:value-type="float" office:value="62.5" calcext:value-type="float">
            <text:p>62,5</text:p>
          </table:table-cell>
          <table:table-cell table:formula="of:=[.A15]+[.$B$7]" office:value-type="float" office:value="66" calcext:value-type="float">
            <text:p>66,0</text:p>
          </table:table-cell>
          <table:table-cell table:style-name="ce8" table:formula="of:=([.A15]+[.B15])/2" office:value-type="float" office:value="64.25" calcext:value-type="float">
            <text:p>64,3</text:p>
          </table:table-cell>
          <table:table-cell table:style-name="ce4" table:formula="of:=COUNTIFS([$Данные.$B$4:.$B$123];&quot;&gt;=&quot;&amp;[.A15];[$Данные.$B$4:.$B$123];&quot;&lt;&quot;&amp;[.B15])" office:value-type="float" office:value="20" calcext:value-type="float">
            <text:p>20</text:p>
          </table:table-cell>
          <table:table-cell table:style-name="ce12" table:formula="of:=[.D15]/[.$B$3]" office:value-type="percentage" office:value="0.166666666666667" calcext:value-type="percentage">
            <text:p>16,7%</text:p>
          </table:table-cell>
          <table:table-cell table:style-name="ce12" table:formula="of:=SUM([.$E$12:.E15])" office:value-type="percentage" office:value="0.591666666666667" calcext:value-type="percentage">
            <text:p>59,2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5]" office:value-type="float" office:value="66" calcext:value-type="float">
            <text:p>66,0</text:p>
          </table:table-cell>
          <table:table-cell table:formula="of:=[.A16]+[.$B$7]" office:value-type="float" office:value="69.5" calcext:value-type="float">
            <text:p>69,5</text:p>
          </table:table-cell>
          <table:table-cell table:style-name="ce8" table:formula="of:=([.A16]+[.B16])/2" office:value-type="float" office:value="67.75" calcext:value-type="float">
            <text:p>67,8</text:p>
          </table:table-cell>
          <table:table-cell table:style-name="ce4" table:formula="of:=COUNTIFS([$Данные.$B$4:.$B$123];&quot;&gt;=&quot;&amp;[.A16];[$Данные.$B$4:.$B$123];&quot;&lt;&quot;&amp;[.B16])" office:value-type="float" office:value="27" calcext:value-type="float">
            <text:p>27</text:p>
          </table:table-cell>
          <table:table-cell table:style-name="ce12" table:formula="of:=[.D16]/[.$B$3]" office:value-type="percentage" office:value="0.225" calcext:value-type="percentage">
            <text:p>22,5%</text:p>
          </table:table-cell>
          <table:table-cell table:style-name="ce12" table:formula="of:=SUM([.$E$12:.E16])" office:value-type="percentage" office:value="0.816666666666667" calcext:value-type="percentage">
            <text:p>81,7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6]" office:value-type="float" office:value="69.5" calcext:value-type="float">
            <text:p>69,5</text:p>
          </table:table-cell>
          <table:table-cell table:formula="of:=[.A17]+[.$B$7]" office:value-type="float" office:value="73" calcext:value-type="float">
            <text:p>73,0</text:p>
          </table:table-cell>
          <table:table-cell table:style-name="ce8" table:formula="of:=([.A17]+[.B17])/2" office:value-type="float" office:value="71.25" calcext:value-type="float">
            <text:p>71,3</text:p>
          </table:table-cell>
          <table:table-cell table:style-name="ce4" table:formula="of:=COUNTIFS([$Данные.$B$4:.$B$123];&quot;&gt;=&quot;&amp;[.A17];[$Данные.$B$4:.$B$123];&quot;&lt;&quot;&amp;[.B17])" office:value-type="float" office:value="9" calcext:value-type="float">
            <text:p>9</text:p>
          </table:table-cell>
          <table:table-cell table:style-name="ce12" table:formula="of:=[.D17]/[.$B$3]" office:value-type="percentage" office:value="0.075" calcext:value-type="percentage">
            <text:p>7,5%</text:p>
          </table:table-cell>
          <table:table-cell table:style-name="ce12" table:formula="of:=SUM([.$E$12:.E17])" office:value-type="percentage" office:value="0.891666666666667" calcext:value-type="percentage">
            <text:p>89,2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7]" office:value-type="float" office:value="73" calcext:value-type="float">
            <text:p>73,0</text:p>
          </table:table-cell>
          <table:table-cell table:formula="of:=[.A18]+[.$B$7]" office:value-type="float" office:value="76.5" calcext:value-type="float">
            <text:p>76,5</text:p>
          </table:table-cell>
          <table:table-cell table:style-name="ce8" table:formula="of:=([.A18]+[.B18])/2" office:value-type="float" office:value="74.75" calcext:value-type="float">
            <text:p>74,8</text:p>
          </table:table-cell>
          <table:table-cell table:style-name="ce4" table:formula="of:=COUNTIFS([$Данные.$B$4:.$B$123];&quot;&gt;=&quot;&amp;[.A18];[$Данные.$B$4:.$B$123];&quot;&lt;&quot;&amp;[.B18])" office:value-type="float" office:value="9" calcext:value-type="float">
            <text:p>9</text:p>
          </table:table-cell>
          <table:table-cell table:style-name="ce12" table:formula="of:=[.D18]/[.$B$3]" office:value-type="percentage" office:value="0.075" calcext:value-type="percentage">
            <text:p>7,5%</text:p>
          </table:table-cell>
          <table:table-cell table:style-name="ce12" table:formula="of:=SUM([.$E$12:.E18])" office:value-type="percentage" office:value="0.966666666666667" calcext:value-type="percentage">
            <text:p>96,7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8]" office:value-type="float" office:value="76.5" calcext:value-type="float">
            <text:p>76,5</text:p>
          </table:table-cell>
          <table:table-cell table:formula="of:=[.A19]+[.$B$7]" office:value-type="float" office:value="80" calcext:value-type="float">
            <text:p>80,0</text:p>
          </table:table-cell>
          <table:table-cell table:style-name="ce8" table:formula="of:=([.A19]+[.B19])/2" office:value-type="float" office:value="78.25" calcext:value-type="float">
            <text:p>78,3</text:p>
          </table:table-cell>
          <table:table-cell table:style-name="ce4" table:formula="of:=COUNTIFS([$Данные.$B$4:.$B$123];&quot;&gt;=&quot;&amp;[.A19];[$Данные.$B$4:.$B$123];&quot;&lt;=&quot;&amp;[.B19])" office:value-type="float" office:value="4" calcext:value-type="float">
            <text:p>4</text:p>
          </table:table-cell>
          <table:table-cell table:style-name="ce12" table:formula="of:=[.D19]/[.$B$3]" office:value-type="percentage" office:value="0.0333333333333333" calcext:value-type="percentage">
            <text:p>3,3%</text:p>
          </table:table-cell>
          <table:table-cell table:style-name="ce12" table:formula="of:=SUM([.$E$12:.E19])" office:value-type="percentage" office:value="1" calcext:value-type="percentage">
            <text:p>100,0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style-name="Default" table:number-columns-repeated="2"/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Контроль суммы частот</text:p>
          </table:table-cell>
          <table:table-cell table:style-name="ce4" table:formula="of:=SUM([.D12:.D19])" office:value-type="float" office:value="120" calcext:value-type="float">
            <text:p>120</text:p>
          </table:table-cell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Контроль суммы частостей</text:p>
          </table:table-cell>
          <table:table-cell table:style-name="ce12" table:formula="of:=SUM([.E12:.E19])" office:value-type="percentage" office:value="1" calcext:value-type="percentage">
            <text:p>100,0%</text:p>
          </table:table-cell>
          <table:table-cell table:number-columns-repeated="12"/>
          <table:table-cell table:style-name="Default" table:number-columns-repeated="16370"/>
        </table:table-row>
        <table:table-row table:style-name="ro2" table:number-rows-repeated="2">
          <table:table-cell table:style-name="Default" table:number-columns-repeated="2"/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10" office:value-type="string" calcext:value-type="string" table:number-columns-spanned="6" table:number-rows-spanned="3">
            <text:p>Кумулятивная линия показывает долю наблюдений, не превышающих верхнюю границу соответствующего интервала.</text:p>
          </table:table-cell>
          <table:covered-table-cell table:number-columns-repeated="5" table:style-name="ce11"/>
          <table:table-cell table:number-columns-repeated="8"/>
          <table:table-cell table:style-name="Default" table:number-columns-repeated="16370"/>
        </table:table-row>
        <table:table-row table:style-name="ro4">
          <table:covered-table-cell table:number-columns-repeated="6" table:style-name="ce11"/>
          <table:table-cell table:number-columns-repeated="8"/>
          <table:table-cell table:style-name="Default" table:number-columns-repeated="16370"/>
        </table:table-row>
        <table:table-row table:style-name="ro2">
          <table:covered-table-cell table:number-columns-repeated="6" table:style-name="ce11"/>
          <table:table-cell table:number-columns-repeated="8"/>
          <table:table-cell table:style-name="Default" table:number-columns-repeated="16370"/>
        </table:table-row>
        <table:table-row table:style-name="ro2">
          <table:table-cell table:style-name="Default" table:number-columns-repeated="2"/>
          <table:table-cell table:number-columns-repeated="4"/>
          <table:table-cell>
            <draw:frame table:end-cell-address="Распределение.M43" table:end-x="1.957cm" table:end-y="0.052cm" draw:z-index="1" draw:name="Chart 2" draw:style-name="gr1" draw:text-style-name="P1" svg:width="15.715cm" svg:height="7.989cm" svg:x="0cm" svg:y="0cm">
              <draw:object draw:notify-on-update-of-ranges="Распределение.B12:Распределение.B19 Распределение.F12:Распределение.F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style-name="Default" table:number-columns-repeated="16370"/>
        </table:table-row>
        <table:named-expressions>
          <table:named-range table:name="_xlnm.Print_Area" table:base-cell-address="$Данные.$A$1" table:cell-range-address="$Распределение.$A$1:.$N$4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table-cell-properties fo:wrap-option="wrap"/>
      <style:paragraph-properties style:tab-stop-distance="1.25cm"/>
      <style:text-properties style:font-name="Liberation Sans" fo:font-size="10pt" fo:language="ru" fo:country="RU" style:font-name-asian="Linux Libertine G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nux Libertine G" style:font-family-asian="'Linux Libertine G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1" number:min-decimal-places="1" number:min-integer-digits="1"/>
    </number:number-style>
    <number:percentage-style style:name="N138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143cm" fo:margin-bottom="1.143cm" fo:margin-left="0.889cm" fo:margin-right="0.889cm" style:print-page-order="ttb" style:first-page-number="continue" style:scale-to-X="1" style:scale-to-Y="2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Распределение" style:display-name="PageStyle_Распределение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Данные" style:display-name="PageStyle_Данные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3T19:28:32</meta:creation-date>
    <dc:date>2026-07-23T19:28:32</dc:date>
    <meta:generator>LibreOfficeDev/26.8.0.0.alpha0$MacOSX_AARCH64 LibreOffice_project/2c87e51eeaa2b413ff4ae097b2705eea1995d8e5</meta:generator>
    <meta:document-statistic meta:table-count="2" meta:cell-count="316" meta:object-count="2"/>
    <meta:user-defined meta:name="AppVersion">12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38">
      <number:number number:decimal-places="1" number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25" chart:interval-minor-divisor="5" chart:gap-width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width="0.026cm" svg:stroke-color="#878787"/>
    </style:style>
    <style:style style:name="ch8" style:family="chart" style:data-style-name="N138">
      <style:chart-properties chart:link-data-style-to-source="true"/>
      <style:graphic-properties svg:stroke-width="0.035cm" svg:stroke-color="#24758c" draw:fill-color="#4b91a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chart>
      <chart:chart svg:width="15.716cm" svg:height="7.991cm" xlink:href=".." xlink:type="simple" chart:class="chart:bar" chart:style-name="ch1">
        <chart:title svg:x="3.16cm" svg:y="0.295cm" chart:style-name="ch2">
          <text:p><text:span text:style-name="T1">Гистограмма времени обработки</text:span></text:p>
        </chart:title>
        <chart:plot-area chart:style-name="ch3" svg:x="1.363cm" svg:y="1.343cm" svg:width="14.039cm" svg:height="5.47cm">
          <chart:coordinate-region svg:x="2.209cm" svg:y="1.516cm" svg:width="13.193cm" svg:height="4.703cm"/>
          <chart:axis chart:dimension="x" chart:name="primary-x" chart:style-name="ch4" chartooo:axis-type="auto">
            <chartooo:date-scale/>
            <chart:title svg:x="6.6cm" svg:y="6.972cm" chart:style-name="ch2">
              <text:p><text:span text:style-name="T2">Середина интервала, с</text:span></text:p>
            </chart:title>
            <chart:categories table:cell-range-address="Распределение.C12:Распределение.C19"/>
          </chart:axis>
          <chart:axis chart:dimension="y" chart:name="primary-y" chart:style-name="ch5">
            <chart:title svg:x="0.451cm" svg:y="4.793cm" chart:style-name="ch6">
              <text:p><text:span text:style-name="T2">Частость</text:span></text:p>
            </chart:title>
            <chart:grid chart:style-name="ch7" chart:class="major"/>
          </chart:axis>
          <chart:series chart:style-name="ch8" chart:values-cell-range-address="Распределение.E12:Распределение.E19" loext:label-string="&quot;Частость&quot;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сть</text:p>
              </table:table-cell>
            </table:table-row>
          </table:table-header-rows>
          <table:table-rows>
            <table:table-row>
              <table:table-cell office:value-type="float" office:value="53.75">
                <text:p>53.75</text:p>
                <draw:g>
                  <svg:desc>Распределение.C12:Распределение.C19</svg:desc>
                </draw:g>
              </table:table-cell>
              <table:table-cell office:value-type="float" office:value="0.0666666666666667">
                <text:p>0.0666666666666667</text:p>
                <draw:g>
                  <svg:desc>Распределение.E12:Распределение.E19</svg:desc>
                </draw:g>
              </table:table-cell>
            </table:table-row>
            <table:table-row>
              <table:table-cell office:value-type="float" office:value="57.25">
                <text:p>57.25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float" office:value="60.75">
                <text:p>60.75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float" office:value="64.25">
                <text:p>64.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67.75">
                <text:p>67.7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71.25">
                <text:p>71.2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74.75">
                <text:p>74.7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78.25">
                <text:p>78.25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Dev/26.8.0.0.alpha0$MacOSX_AARCH64 LibreOffice_project/2c87e51eeaa2b413ff4ae097b2705eea1995d8e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38">
      <number:number number:decimal-places="1" number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1" chart:interval-major="0.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width="0.026cm" svg:stroke-color="#878787"/>
    </style:style>
    <style:style style:name="ch8" style:family="chart" style:data-style-name="N138">
      <style:chart-properties chart:symbol-type="named-symbol" chart:symbol-name="circle" chart:symbol-width="0.176cm" chart:symbol-height="0.176cm" chart:link-data-style-to-source="true"/>
      <style:graphic-properties svg:stroke-width="0.079cm" svg:stroke-color="#24758c" draw:fill-color="#24758c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chart>
      <chart:chart svg:width="15.716cm" svg:height="7.991cm" xlink:href=".." xlink:type="simple" chart:class="chart:line" chart:style-name="ch1">
        <chart:title svg:x="4.882cm" svg:y="0.295cm" chart:style-name="ch2">
          <text:p><text:span text:style-name="T1">Кумулятивная линия</text:span></text:p>
        </chart:title>
        <chart:plot-area chart:style-name="ch3" svg:x="1.363cm" svg:y="1.343cm" svg:width="14.039cm" svg:height="5.47cm">
          <chart:coordinate-region svg:x="2.383cm" svg:y="1.516cm" svg:width="13.019cm" svg:height="4.703cm"/>
          <chart:axis chart:dimension="x" chart:name="primary-x" chart:style-name="ch4" chartooo:axis-type="auto">
            <chartooo:date-scale/>
            <chart:title svg:x="6.063cm" svg:y="6.972cm" chart:style-name="ch2">
              <text:p><text:span text:style-name="T2">Верхняя граница интервала, с</text:span></text:p>
            </chart:title>
            <chart:categories table:cell-range-address="Распределение.B12:Распределение.B19"/>
          </chart:axis>
          <chart:axis chart:dimension="y" chart:name="primary-y" chart:style-name="ch5">
            <chart:title svg:x="0.451cm" svg:y="5.815cm" chart:style-name="ch6">
              <text:p><text:span text:style-name="T2">Накопленная частость</text:span></text:p>
            </chart:title>
            <chart:grid chart:style-name="ch7" chart:class="major"/>
          </chart:axis>
          <chart:series chart:style-name="ch8" chart:values-cell-range-address="Распределение.F12:Распределение.F19" loext:label-string="&quot;Накопленная частость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акопленная частость</text:p>
              </table:table-cell>
            </table:table-row>
          </table:table-header-rows>
          <table:table-rows>
            <table:table-row>
              <table:table-cell office:value-type="float" office:value="55.5">
                <text:p>55.5</text:p>
                <draw:g>
                  <svg:desc>Распределение.B12:Распределение.B19</svg:desc>
                </draw:g>
              </table:table-cell>
              <table:table-cell office:value-type="float" office:value="0.0666666666666667">
                <text:p>0.0666666666666667</text:p>
                <draw:g>
                  <svg:desc>Распределение.F12:Распределение.F19</svg:desc>
                </draw:g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91666666666667">
                <text:p>0.591666666666667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891666666666667">
                <text:p>0.8916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Dev/26.8.0.0.alpha0$MacOSX_AARCH64 LibreOffice_project/2c87e51eeaa2b413ff4ae097b2705eea1995d8e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