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0" fo:wrap-option="wrap" fo:border="0.06pt solid #6b7a80"/>
      <style:text-properties fo:font-size="9pt" fo:font-weight="bold"/>
    </style:style>
    <style:style style:name="input" style:family="table-cell" style:parent-style-name="Default">
      <style:table-cell-properties fo:background-color="#fff4cc" fo:border="0.06pt solid #a0a0a0"/>
    </style:style>
    <style:style style:name="percent" style:family="table-cell" style:parent-style-name="Default" style:data-style-name="N114">
      <style:table-cell-properties fo:border="0.06pt solid #a0a0a0"/>
    </style:style>
    <style:style style:name="number" style:family="table-cell" style:parent-style-name="Default">
      <style:table-cell-properties fo:border="0.06pt solid #a0a0a0"/>
      <style:text-properties fo:font-size="9pt"/>
    </style:style>
    <style:style style:name="result" style:family="table-cell" style:parent-style-name="Default">
      <style:table-cell-properties fo:background-color="#e8f1e2" fo:border="0.06pt solid #a0a0a0"/>
    </style:style>
  </office:automatic-styles>
  <office:body>
    <office:spreadsheet>
      <table:table table:name="Расчёт" table:style-name="ta1">
        <table:table-column table:style-name="co1" table:default-cell-style-name="input"/>
        <table:table-column table:style-name="co2" table:default-cell-style-name="input"/>
        <table:table-column table:style-name="co3" table:default-cell-style-name="input"/>
        <table:table-column table:style-name="co4" table:default-cell-style-name="percent"/>
        <table:table-column table:style-name="co5" table:visibility="collapse" table:number-columns-repeated="3" table:default-cell-style-name="number"/>
        <table:table-column table:style-name="co5" table:visibility="collapse" table:number-columns-repeated="2" table:default-cell-style-name="percent"/>
        <table:table-column table:style-name="co5" table:visibility="collapse" table:number-columns-repeated="4" table:default-cell-style-name="number"/>
        <table:table-column table:style-name="co5" table:visibility="collapse" table:number-columns-repeated="2" table:default-cell-style-name="percent"/>
        <table:table-column table:style-name="co6" table:default-cell-style-name="result"/>
        <table:table-column table:style-name="co6" table:number-columns-repeated="2" table:default-cell-style-name="percent"/>
        <table:table-row table:style-name="ro1">
          <table:table-cell table:style-name="ce1" office:value-type="string" calcext:value-type="string">
            <text:p>Канал</text:p>
          </table:table-cell>
          <table:table-cell table:style-name="ce1" office:value-type="string" calcext:value-type="string">
            <text:p>Наблюдения n</text:p>
          </table:table-cell>
          <table:table-cell table:style-name="ce1" office:value-type="string" calcext:value-type="string">
            <text:p>События m</text:p>
          </table:table-cell>
          <table:table-cell table:style-name="ce1" office:value-type="string" calcext:value-type="string">
            <text:p>Частость p*</text:p>
          </table:table-cell>
          <table:table-cell table:style-name="ce1" office:value-type="string" calcext:value-type="string">
            <text:p>Критерий применимости</text:p>
          </table:table-cell>
          <table:table-cell table:style-name="ce1" office:value-type="string" calcext:value-type="string">
            <text:p>СКО p*</text:p>
          </table:table-cell>
          <table:table-cell table:style-name="ce1" office:value-type="string" calcext:value-type="string">
            <text:p>t(0,05)</text:p>
          </table:table-cell>
          <table:table-cell table:style-name="ce1" office:value-type="string" calcext:value-type="string">
            <text:p>Нижняя граница: традиц.</text:p>
          </table:table-cell>
          <table:table-cell table:style-name="ce1" office:value-type="string" calcext:value-type="string">
            <text:p>Верхняя граница: традиц.</text:p>
          </table:table-cell>
          <table:table-cell table:style-name="ce1" office:value-type="string" calcext:value-type="string">
            <text:p>φ</text:p>
          </table:table-cell>
          <table:table-cell table:style-name="ce1" office:value-type="string" calcext:value-type="string">
            <text:p>СКО φ</text:p>
          </table:table-cell>
          <table:table-cell table:style-name="ce1" office:value-type="string" calcext:value-type="string">
            <text:p>Нижняя граница φ</text:p>
          </table:table-cell>
          <table:table-cell table:style-name="ce1" office:value-type="string" calcext:value-type="string">
            <text:p>Верхняя граница φ</text:p>
          </table:table-cell>
          <table:table-cell table:style-name="ce1" office:value-type="string" calcext:value-type="string">
            <text:p>Нижняя граница: Фишер</text:p>
          </table:table-cell>
          <table:table-cell table:style-name="ce1" office:value-type="string" calcext:value-type="string">
            <text:p>Верхняя граница: Фишер</text:p>
          </table:table-cell>
          <table:table-cell table:style-name="ce1" office:value-type="string" calcext:value-type="string">
            <text:p>Выбранный способ</text:p>
          </table:table-cell>
          <table:table-cell table:style-name="ce1" office:value-type="string" calcext:value-type="string">
            <text:p>Нижняя граница 95%</text:p>
          </table:table-cell>
          <table:table-cell table:style-name="ce1" office:value-type="string" calcext:value-type="string">
            <text:p>Верхняя граница 95%</text:p>
          </table:table-cell>
        </table:table-row>
        <table:table-row table:style-name="ro2">
          <table:table-cell office:value-type="string" calcext:value-type="string">
            <text:p>Поисковая реклама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table:formula="of:=[.C2]/[.B2]" office:value-type="percentage" office:value="0.04" calcext:value-type="percentage">
            <text:p>4,000%</text:p>
          </table:table-cell>
          <table:table-cell table:formula="of:=[.B2]*[.D2]*(1-[.D2])" office:value-type="float" office:value="46.08" calcext:value-type="float">
            <text:p>46,08</text:p>
          </table:table-cell>
          <table:table-cell table:formula="of:=SQRT([.D2]*(1-[.D2])/[.B2])" office:value-type="float" office:value="0.00565685424949238" calcext:value-type="float">
            <text:p>0,00565685424949238</text:p>
          </table:table-cell>
          <table:table-cell table:formula="of:=TINV(0.05;[.B2]-1)" office:value-type="float" office:value="1.96194449083867" calcext:value-type="float">
            <text:p>1,96194449083867</text:p>
          </table:table-cell>
          <table:table-cell table:formula="of:=[.D2]-[.G2]*[.F2]" office:value-type="percentage" office:value="0.0289015659697311" calcext:value-type="percentage">
            <text:p>2,890%</text:p>
          </table:table-cell>
          <table:table-cell table:formula="of:=[.D2]+[.G2]*[.F2]" office:value-type="percentage" office:value="0.0510984340302689" calcext:value-type="percentage">
            <text:p>5,110%</text:p>
          </table:table-cell>
          <table:table-cell table:formula="of:=2*ASIN(SQRT([.D2]))" office:value-type="float" office:value="0.402715841580662" calcext:value-type="float">
            <text:p>0,402715841580662</text:p>
          </table:table-cell>
          <table:table-cell table:formula="of:=1/SQRT([.B2])" office:value-type="float" office:value="0.0288675134594813" calcext:value-type="float">
            <text:p>0,0288675134594813</text:p>
          </table:table-cell>
          <table:table-cell table:formula="of:=[.J2]-[.G2]*[.K2]" office:value-type="float" office:value="0.346079382584621" calcext:value-type="float">
            <text:p>0,346079382584621</text:p>
          </table:table-cell>
          <table:table-cell table:formula="of:=[.J2]+[.G2]*[.K2]" office:value-type="float" office:value="0.459352300576702" calcext:value-type="float">
            <text:p>0,459352300576702</text:p>
          </table:table-cell>
          <table:table-cell table:formula="of:=SIN([.L2]/2)^2" office:value-type="percentage" office:value="0.0296450695670073" calcext:value-type="percentage">
            <text:p>2,965%</text:p>
          </table:table-cell>
          <table:table-cell table:formula="of:=SIN([.M2]/2)^2" office:value-type="percentage" office:value="0.0518300727576221" calcext:value-type="percentage">
            <text:p>5,183%</text:p>
          </table:table-cell>
          <table:table-cell office:value-type="string" calcext:value-type="string">
            <text:p>Традиционный</text:p>
          </table:table-cell>
          <table:table-cell table:formula="of:=IF([.E2]&gt;5;[.H2];[.N2])" office:value-type="percentage" office:value="0.0289015659697311" calcext:value-type="percentage">
            <text:p>2,890%</text:p>
          </table:table-cell>
          <table:table-cell table:formula="of:=IF([.E2]&gt;5;[.I2];[.O2])" office:value-type="percentage" office:value="0.0510984340302689" calcext:value-type="percentage">
            <text:p>5,110%</text:p>
          </table:table-cell>
        </table:table-row>
        <table:table-row table:style-name="ro2">
          <table:table-cell office:value-type="string" calcext:value-type="string">
            <text:p>Партнёрский канал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[.C3]/[.B3]" office:value-type="percentage" office:value="0.0290322580645161" calcext:value-type="percentage">
            <text:p>2,903%</text:p>
          </table:table-cell>
          <table:table-cell table:formula="of:=[.B3]*[.D3]*(1-[.D3])" office:value-type="float" office:value="8.73870967741935" calcext:value-type="float">
            <text:p>8,73870967741935</text:p>
          </table:table-cell>
          <table:table-cell table:formula="of:=SQRT([.D3]*(1-[.D3])/[.B3])" office:value-type="float" office:value="0.00953590600871618" calcext:value-type="float">
            <text:p>0,00953590600871618</text:p>
          </table:table-cell>
          <table:table-cell table:formula="of:=TINV(0.05;[.B3]-1)" office:value-type="float" office:value="1.9676708851814" calcext:value-type="float">
            <text:p>1,9676708851814</text:p>
          </table:table-cell>
          <table:table-cell table:formula="of:=[.D3]-[.G3]*[.F3]" office:value-type="percentage" office:value="0.010268733447339" calcext:value-type="percentage">
            <text:p>1,027%</text:p>
          </table:table-cell>
          <table:table-cell table:formula="of:=[.D3]+[.G3]*[.F3]" office:value-type="percentage" office:value="0.0477957826816933" calcext:value-type="percentage">
            <text:p>4,780%</text:p>
          </table:table-cell>
          <table:table-cell table:formula="of:=2*ASIN(SQRT([.D3]))" office:value-type="float" office:value="0.342447944155584" calcext:value-type="float">
            <text:p>0,342447944155584</text:p>
          </table:table-cell>
          <table:table-cell table:formula="of:=1/SQRT([.B3])" office:value-type="float" office:value="0.0567961834247065" calcext:value-type="float">
            <text:p>0,0567961834247065</text:p>
          </table:table-cell>
          <table:table-cell table:formula="of:=[.J3]-[.G3]*[.K3]" office:value-type="float" office:value="0.230691747641367" calcext:value-type="float">
            <text:p>0,230691747641367</text:p>
          </table:table-cell>
          <table:table-cell table:formula="of:=[.J3]+[.G3]*[.K3]" office:value-type="float" office:value="0.454204140669802" calcext:value-type="float">
            <text:p>0,454204140669802</text:p>
          </table:table-cell>
          <table:table-cell table:formula="of:=SIN([.L3]/2)^2" office:value-type="percentage" office:value="0.0132457704265593" calcext:value-type="percentage">
            <text:p>1,325%</text:p>
          </table:table-cell>
          <table:table-cell table:formula="of:=SIN([.M3]/2)^2" office:value-type="percentage" office:value="0.05069475307567" calcext:value-type="percentage">
            <text:p>5,069%</text:p>
          </table:table-cell>
          <table:table-cell office:value-type="string" calcext:value-type="string">
            <text:p>Традиционный</text:p>
          </table:table-cell>
          <table:table-cell table:formula="of:=IF([.E3]&gt;5;[.H3];[.N3])" office:value-type="percentage" office:value="0.010268733447339" calcext:value-type="percentage">
            <text:p>1,027%</text:p>
          </table:table-cell>
          <table:table-cell table:formula="of:=IF([.E3]&gt;5;[.I3];[.O3])" office:value-type="percentage" office:value="0.0477957826816933" calcext:value-type="percentage">
            <text:p>4,780%</text:p>
          </table:table-cell>
        </table:table-row>
        <table:table-row table:style-name="ro2">
          <table:table-cell office:value-type="string" calcext:value-type="string">
            <text:p>Email-рассылка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C4]/[.B4]" office:value-type="percentage" office:value="0.0210526315789474" calcext:value-type="percentage">
            <text:p>2,105%</text:p>
          </table:table-cell>
          <table:table-cell table:formula="of:=[.B4]*[.D4]*(1-[.D4])" office:value-type="float" office:value="1.95789473684211" calcext:value-type="float">
            <text:p>1,95789473684211</text:p>
          </table:table-cell>
          <table:table-cell table:formula="of:=SQRT([.D4]*(1-[.D4])/[.B4])" office:value-type="float" office:value="0.0147289254556963" calcext:value-type="float">
            <text:p>0,0147289254556963</text:p>
          </table:table-cell>
          <table:table-cell table:formula="of:=TINV(0.05;[.B4]-1)" office:value-type="float" office:value="1.98552342140674" calcext:value-type="float">
            <text:p>1,98552342140674</text:p>
          </table:table-cell>
          <table:table-cell table:formula="of:=[.D4]-[.G4]*[.F4]" office:value-type="percentage" office:value="-0.00819199488549147" calcext:value-type="percentage">
            <text:p>-,819%</text:p>
          </table:table-cell>
          <table:table-cell table:formula="of:=[.D4]+[.G4]*[.F4]" office:value-type="percentage" office:value="0.0502972580433862" calcext:value-type="percentage">
            <text:p>5,030%</text:p>
          </table:table-cell>
          <table:table-cell table:formula="of:=2*ASIN(SQRT([.D4]))" office:value-type="float" office:value="0.29121848118564" calcext:value-type="float">
            <text:p>0,29121848118564</text:p>
          </table:table-cell>
          <table:table-cell table:formula="of:=1/SQRT([.B4])" office:value-type="float" office:value="0.102597835208515" calcext:value-type="float">
            <text:p>0,102597835208515</text:p>
          </table:table-cell>
          <table:table-cell table:formula="of:=[.J4]-[.G4]*[.K4]" office:value-type="float" office:value="0.0875080763935035" calcext:value-type="float">
            <text:p>0,0875080763935035</text:p>
          </table:table-cell>
          <table:table-cell table:formula="of:=[.J4]+[.G4]*[.K4]" office:value-type="float" office:value="0.494928885977776" calcext:value-type="float">
            <text:p>0,494928885977776</text:p>
          </table:table-cell>
          <table:table-cell table:formula="of:=SIN([.L4]/2)^2" office:value-type="percentage" office:value="0.00191319450762311" calcext:value-type="percentage">
            <text:p>,191%</text:p>
          </table:table-cell>
          <table:table-cell table:formula="of:=SIN([.M4]/2)^2" office:value-type="percentage" office:value="0.0599987554887546" calcext:value-type="percentage">
            <text:p>6,000%</text:p>
          </table:table-cell>
          <table:table-cell office:value-type="string" calcext:value-type="string">
            <text:p>Фишера</text:p>
          </table:table-cell>
          <table:table-cell table:formula="of:=IF([.E4]&gt;5;[.H4];[.N4])" office:value-type="percentage" office:value="0.00191319450762311" calcext:value-type="percentage">
            <text:p>,191%</text:p>
          </table:table-cell>
          <table:table-cell table:formula="of:=IF([.E4]&gt;5;[.I4];[.O4])" office:value-type="percentage" office:value="0.0599987554887546" calcext:value-type="percentage">
            <text:p>6,000%</text:p>
          </table:table-cell>
        </table:table-row>
        <table:table-row table:style-name="ro2">
          <table:table-cell office:value-type="string" calcext:value-type="string">
            <text:p>Тестовый канал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5]/[.B5]" office:value-type="percentage" office:value="0.0166666666666667" calcext:value-type="percentage">
            <text:p>1,667%</text:p>
          </table:table-cell>
          <table:table-cell table:formula="of:=[.B5]*[.D5]*(1-[.D5])" office:value-type="float" office:value="0.983333333333333" calcext:value-type="float">
            <text:p>0,983333333333333</text:p>
          </table:table-cell>
          <table:table-cell table:formula="of:=SQRT([.D5]*(1-[.D5])/[.B5])" office:value-type="float" office:value="0.016527194200715" calcext:value-type="float">
            <text:p>0,016527194200715</text:p>
          </table:table-cell>
          <table:table-cell table:formula="of:=TINV(0.05;[.B5]-1)" office:value-type="float" office:value="2.00099524586997" calcext:value-type="float">
            <text:p>2,00099524586997</text:p>
          </table:table-cell>
          <table:table-cell table:formula="of:=[.D5]-[.G5]*[.F5]" office:value-type="percentage" office:value="-0.0164041703565339" calcext:value-type="percentage">
            <text:p>-1,640%</text:p>
          </table:table-cell>
          <table:table-cell table:formula="of:=[.D5]+[.G5]*[.F5]" office:value-type="percentage" office:value="0.0497375036898672" calcext:value-type="percentage">
            <text:p>4,974%</text:p>
          </table:table-cell>
          <table:table-cell table:formula="of:=2*ASIN(SQRT([.D5]))" office:value-type="float" office:value="0.258921542006221" calcext:value-type="float">
            <text:p>0,258921542006221</text:p>
          </table:table-cell>
          <table:table-cell table:formula="of:=1/SQRT([.B5])" office:value-type="float" office:value="0.129099444873581" calcext:value-type="float">
            <text:p>0,129099444873581</text:p>
          </table:table-cell>
          <table:table-cell table:formula="of:=[.J5]-[.G5]*[.K5]" office:value-type="float" office:value="0.000594166569733934" calcext:value-type="float">
            <text:p>0,000594166569733934</text:p>
          </table:table-cell>
          <table:table-cell table:formula="of:=[.J5]+[.G5]*[.K5]" office:value-type="float" office:value="0.517248917442708" calcext:value-type="float">
            <text:p>0,517248917442708</text:p>
          </table:table-cell>
          <table:table-cell table:formula="of:=SIN([.L5]/2)^2" office:value-type="percentage" office:value="0.0000000882584755508278" calcext:value-type="percentage">
            <text:p>,000%</text:p>
          </table:table-cell>
          <table:table-cell table:formula="of:=SIN([.M5]/2)^2" office:value-type="percentage" office:value="0.0654085738947965" calcext:value-type="percentage">
            <text:p>6,541%</text:p>
          </table:table-cell>
          <table:table-cell office:value-type="string" calcext:value-type="string">
            <text:p>Фишера</text:p>
          </table:table-cell>
          <table:table-cell table:formula="of:=IF([.E5]&gt;5;[.H5];[.N5])" office:value-type="percentage" office:value="0.0000000882584755508278" calcext:value-type="percentage">
            <text:p>,000%</text:p>
          </table:table-cell>
          <table:table-cell table:formula="of:=IF([.E5]&gt;5;[.I5];[.O5])" office:value-type="percentage" office:value="0.0654085738947965" calcext:value-type="percentage">
            <text:p>6,5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0" meta:object-count="0"/>
    <meta:generator>LibreOfficeDev/26.8.0.0.alpha0$MacOSX_AARCH64 LibreOffice_project/2c87e51eeaa2b413ff4ae097b2705eea1995d8e5</meta:generator>
  </office:meta>
</office:document-meta>
</file>